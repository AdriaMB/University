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5000000519A8A7F72.png" manifest:media-type="image/png"/>
  <manifest:file-entry manifest:full-path="Pictures/100000010000006B0000001107C5C09B.png" manifest:media-type="image/png"/>
  <manifest:file-entry manifest:full-path="Pictures/10000001000000A400000010F8DCE0D5.png" manifest:media-type="image/png"/>
  <manifest:file-entry manifest:full-path="Pictures/10000001000000EC0000009FB4703EBC.png" manifest:media-type="image/png"/>
  <manifest:file-entry manifest:full-path="Pictures/10000001000002AC000002155497405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officeooo:rsid="00196672" officeooo:paragraph-rsid="00196672"/>
    </style:style>
    <style:style style:name="P2" style:family="paragraph" style:parent-style-name="Standard">
      <style:text-properties officeooo:rsid="00196672"/>
    </style:style>
    <style:style style:name="P3" style:family="paragraph" style:parent-style-name="Standard">
      <style:text-properties officeooo:rsid="00196672" officeooo:paragraph-rsid="001af964"/>
    </style:style>
    <style:style style:name="P4" style:family="paragraph" style:parent-style-name="Standard">
      <style:text-properties officeooo:rsid="001af964" officeooo:paragraph-rsid="001af964"/>
    </style:style>
    <style:style style:name="P5" style:family="paragraph" style:parent-style-name="Standard">
      <style:text-properties officeooo:paragraph-rsid="001af964"/>
    </style:style>
    <style:style style:name="T1" style:family="text">
      <style:text-properties officeooo:rsid="001af964"/>
    </style:style>
    <style:style style:name="T2" style:family="text">
      <style:text-properties fo:font-family="Cambria, serif" fo:font-size="12pt" style:text-underline-style="solid" style:text-underline-width="auto" style:text-underline-color="font-color"/>
    </style:style>
    <style:style style:name="T3" style:family="text">
      <style:text-properties fo:font-family="Cambria, serif" fo:font-size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RIÀ MARÍN BAYARRI</text:p>
      <text:p text:style-name="P1">a)</text:p>
      <text:p text:style-name="P2"><draw:frame draw:style-name="fr1" draw:name="Image1" text:anchor-type="char" svg:width="6.9252in" svg:height="5.3957in" draw:z-index="0"><draw:image xlink:href="Pictures/10000001000002AC0000021554974050.png" xlink:type="simple" xlink:show="embed" xlink:actuate="onLoad" draw:mime-type="image/png"/></draw:frame></text:p>
      <text:p text:style-name="P2"/>
      <text:p text:style-name="P1">b)</text:p>
      <text:p text:style-name="P1">SOLUCIÓN OPTIMA:</text:p>
      <text:p text:style-name="P1"/>
      <text:p text:style-name="P1"><draw:frame draw:style-name="fr2" draw:name="Image2" text:anchor-type="char" svg:x="0.161in" svg:y="0.3437in" svg:width="2.4575in" svg:height="1.6563in" draw:z-index="2"><draw:image xlink:href="Pictures/10000001000000EC0000009FB4703EBC.png" xlink:type="simple" xlink:show="embed" xlink:actuate="onLoad" draw:mime-type="image/png"/></draw:frame><draw:frame draw:style-name="fr2" draw:name="Image4" text:anchor-type="char" svg:x="0.0984in" svg:y="0.052in" svg:width="1.7075in" svg:height="0.1665in" draw:z-index="3"><draw:image xlink:href="Pictures/10000001000000A400000010F8DCE0D5.png" xlink:type="simple" xlink:show="embed" xlink:actuate="onLoad" draw:mime-type="image/png"/></draw:frame><draw:frame draw:style-name="fr2" draw:name="Image5" text:anchor-type="char" svg:x="1.8055in" svg:y="0.052in" svg:width="1.1138in" svg:height="0.1772in" draw:z-index="4"><draw:image xlink:href="Pictures/100000010000006B0000001107C5C09B.png" xlink:type="simple" xlink:show="embed" xlink:actuate="onLoad" draw:mime-type="image/png"/></draw:frame>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l problema nos plantea la organización de una serie de empleados, seniors y aprendices, tales que las incidencias de cada franja horaria puedan ser atendidas con el menor coste de personal posible. En este <text:soft-page-break/>modelo planteamos 8 variables: 4 variables Senior, haciendo referencia a la cantidad de seniors que trabajaran en cada turno(A..D) y 4 variables Aprendiz (funcionan igual que las senior).</text:p>
      <text:p text:style-name="P3"/>
      <text:p text:style-name="P4">El coste minimo es de 6200$. La reparticion mas optima es:<text:line-break/>- 8 Seniors en el turno A.</text:p>
      <text:p text:style-name="P4">- 1 Senior en el turno B.</text:p>
      <text:p text:style-name="P4">- 1 Senior en el turno C.</text:p>
      <text:p text:style-name="P4">- 5 Aprendices en el turno D.</text:p>
      <text:p text:style-name="P1"/>
      <text:p text:style-name="P1"/>
      <text:p text:style-name="P1">c)</text:p>
      <text:p text:style-name="P1"/>
      <text:p text:style-name="P5"><text:span text:style-name="T1">“ E</text:span><text:span text:style-name="T2">n cada franja horaria de 12 a 15, debe haber trabajando al menos un empleado sénior por cada dos aprendices</text:span><text:span text:style-name="T3">. El modelo resultante debe continuar siendo </text:span><text:span text:style-name="Strong_20_Emphasis"><text:span text:style-name="T2">lineal</text:span></text:span><text:span text:style-name="T3">.</text:span><text:span text:style-name="T1">”</text:span></text:p>
      <text:p text:style-name="P1"/>
      <text:p text:style-name="P1"><draw:frame draw:style-name="fr1" draw:name="Image3" text:anchor-type="char" svg:width="6.9252in" svg:height="0.7902in" draw:z-index="1"><draw:image xlink:href="Pictures/10000001000002C5000000519A8A7F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09:34:55.192672447</meta:creation-date>
    <dc:date>2026-05-05T10:34:59.419178251</dc:date>
    <meta:editing-duration>PT11M52S</meta:editing-duration>
    <meta:editing-cycles>1</meta:editing-cycles>
    <meta:generator>LibreOffice/26.2.2.2$Linux_X86_64 LibreOffice_project/620$Build-2</meta:generator>
    <meta:document-statistic meta:table-count="0" meta:image-count="5" meta:object-count="0" meta:page-count="2" meta:paragraph-count="12" meta:word-count="137" meta:character-count="763" meta:non-whitespace-character-count="636"/>
  </office:meta>
</office:document-meta>
</file>